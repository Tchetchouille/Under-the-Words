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Black" svg:font-family="'Arial Black'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2">
      <style:text-properties officeooo:rsid="001fa16a" officeooo:paragraph-rsid="001fa16a"/>
    </style:style>
    <style:style style:name="P2" style:family="paragraph" style:parent-style-name="Standard">
      <style:paragraph-properties fo:text-align="center" style:justify-single-word="false"/>
      <style:text-properties style:font-name="Arial Black" fo:font-size="14pt" fo:language="en" fo:country="US" fo:font-weight="normal" officeooo:rsid="001fa16a" officeooo:paragraph-rsid="001fa16a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 Black" fo:font-size="20pt" fo:language="en" fo:country="US" officeooo:rsid="001fa16a" officeooo:paragraph-rsid="001fa16a" style:font-size-asian="20pt" style:font-size-complex="20pt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text-properties fo:language="en" fo:country="US" officeooo:rsid="001fa16a" officeooo:paragraph-rsid="001fa16a"/>
    </style:style>
    <style:style style:name="P6" style:family="paragraph" style:parent-style-name="Text_20_body">
      <style:text-properties officeooo:rsid="001fa16a" officeooo:paragraph-rsid="001fa16a"/>
    </style:style>
    <style:style style:name="P7" style:family="paragraph" style:parent-style-name="Text_20_body">
      <style:text-properties officeooo:rsid="00206a2d" officeooo:paragraph-rsid="00206a2d"/>
    </style:style>
    <style:style style:name="T1" style:family="text">
      <style:text-properties officeooo:rsid="001fa16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officeooo:rsid="0021ac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NDER THE WORDS</text:p>
      <text:p text:style-name="P3">MONSTERS BELONG IN DUNGEONS</text:p>
      <text:p text:style-name="P4"/>
      <text:h text:style-name="P1" text:outline-level="2">Design Pillars</text:h>
      <text:p text:style-name="P6">- Keep it <text:span text:style-name="T2">SIMPLE</text:span>: no complicated mechanics.</text:p>
      <text:p text:style-name="P6">- Keep it <text:span text:style-name="T2">SMALL</text:span><text:span text:style-name="T3">:</text:span><text:span text:style-name="T2"> </text:span><text:span text:style-name="T3">a </text:span><text:span text:style-name="T2">short</text:span><text:span text:style-name="T3"> story told in a </text:span><text:span text:style-name="T2">few</text:span><text:span text:style-name="T3"> scenes. You can iterate later.</text:span></text:p>
      <text:p text:style-name="P6">- The gameplay should be expressed through the <text:span text:style-name="T2">WORDS</text:span>.<text:span text:style-name="T7"> Words are game objects.</text:span></text:p>
      <text:p text:style-name="P7">- What is described <text:span text:style-name="T6">IN</text:span> the text is what happen in the game <text:span text:style-name="T6">ABOVE</text:span> the text.<text:span text:style-name="T7"> Parallelism.</text:span></text:p>
      <text:p text:style-name="Text_20_body"/>
      <text:h text:style-name="Heading_20_2" text:outline-level="2">Target <text:span text:style-name="T1">A</text:span>udience</text:h>
      <text:p text:style-name="P6">- Queer people, neurodivergent people, and any other monster-like group that can hide behind masks.</text:p>
      <text:p text:style-name="P6">- “Normal” people that are not assholes or proto-fascists.</text:p>
      <text:p text:style-name="P6">- It is a game made for adults.</text:p>
      <text:p text:style-name="Text_20_body"/>
      <text:h text:style-name="Heading_20_2" text:outline-level="2">Player <text:span text:style-name="T1">C</text:span>hallenges</text:h>
      <text:p text:style-name="P6">- </text:p>
      <text:p text:style-name="Text_20_body"/>
      <text:h text:style-name="Heading_20_2" text:outline-level="2"><text:span text:style-name="T1">Key </text:span>Emotions</text:h>
      <text:p text:style-name="P6">- Escapism.</text:p>
      <text:p text:style-name="P6">- Empathy.</text:p>
      <text:p text:style-name="P6">- Comedy (?)</text:p>
      <text:p text:style-name="P6">- Sadness (?)</text:p>
      <text:p text:style-name="Text_20_body"/>
      <text:h text:style-name="Heading_20_2" text:outline-level="2"><text:span text:style-name="T1">Main </text:span>Aesthetics</text:h>
      <text:p text:style-name="P6">- Old-timey text based RPGs.</text:p>
      <text:p text:style-name="Text_20_body"/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Black" svg:font-family="'Arial Black'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29T09:45:17.017841111</meta:creation-date>
    <dc:date>2026-06-29T22:04:29.534515469</dc:date>
    <meta:editing-duration>PT12H19M12S</meta:editing-duration>
    <meta:editing-cycles>3</meta:editing-cycles>
    <meta:generator>LibreOffice/7.4.2.3$MacOSX_X86_64 LibreOffice_project/382eef1f22670f7f4118c8c2dd222ec7ad009daf</meta:generator>
    <meta:document-statistic meta:table-count="0" meta:image-count="0" meta:object-count="0" meta:page-count="1" meta:paragraph-count="20" meta:word-count="118" meta:character-count="661" meta:non-whitespace-character-count="562"/>
  </office:meta>
</office:document-meta>
</file>